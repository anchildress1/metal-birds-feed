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settings.xml" manifest:media-type="text/xml"/>
</manifest:manifest>
</file>

<file path=content.xml><?xml version="1.0" encoding="utf-8"?>
<office:document-content xmlns:office="urn:oasis:names:tc:opendocument:xmlns:office:1.0" xmlns:table="urn:oasis:names:tc:opendocument:xmlns:table:1.0" xmlns:text="urn:oasis:names:tc:opendocument:xmlns:text:1.0" xmlns:style="urn:oasis:names:tc:opendocument:xmlns:style:1.0" xmlns:fo="urn:oasis:names:tc:opendocument:xmlns:xsl-fo-compatible:1.0" xmlns:number="urn:oasis:names:tc:opendocument:xmlns:datastyle:1.0" xmlns:svg="urn:oasis:names:tc:opendocument:xmlns:svg-compatible:1.0" xmlns:xlink="http://www.w3.org/1999/xlink" xmlns:of="urn:oasis:names:tc:opendocument:xmlns:of:1.2" office:version="1.2">
  <office:scripts/>
  <office:font-face-decls/>
  <office:automatic-styles/>
  <office:body>
    <office:spreadsheet>
      <table:table table:name="CivilACRegisterNether2026-04-28">
        <table:table-column table:number-columns-repeated="62"/>
        <table:table-row>
          <table:table-cell office:value-type="string">
            <text:p>Flag [details=n][kolom=j][filter=j][kolom_breedte=s]</text:p>
          </table:table-cell>
          <table:table-cell office:value-type="string">
            <text:p>Registration [details=n][kolom=j][filter=n][kolom_breedte=s]</text:p>
          </table:table-cell>
          <table:table-cell office:value-type="string">
            <text:p>Registered [details=n][kolom=o][filter=n]</text:p>
          </table:table-cell>
          <table:table-cell office:value-type="string">
            <text:p>LatestOwnerChange [details=n][kolom=o][filter=n]</text:p>
          </table:table-cell>
          <table:table-cell office:value-type="string">
            <text:p>PrevCountry [details=n][kolom=o][filter=n]</text:p>
          </table:table-cell>
          <table:table-cell office:value-type="string">
            <text:p>PrevMark [details=n][kolom=o][filter=n][kolom_breedte=s]</text:p>
          </table:table-cell>
          <table:table-cell office:value-type="string">
            <text:p>Manufacturer [details=n][kolom=j][filter=j]</text:p>
          </table:table-cell>
          <table:table-cell office:value-type="string">
            <text:p>ManufacturedIn [details=n][kolom=o][filter=n]</text:p>
          </table:table-cell>
          <table:table-cell office:value-type="string">
            <text:p>Model [details=n][kolom=j][filter=j]</text:p>
          </table:table-cell>
          <table:table-cell office:value-type="string">
            <text:p>Serial [details=n][kolom=j][filter=n]</text:p>
          </table:table-cell>
          <table:table-cell office:value-type="string">
            <text:p>X-Ponder [details=n][kolom=o][filter=n]</text:p>
          </table:table-cell>
          <table:table-cell office:value-type="string">
            <text:p>Built [details=n][kolom=o][filter=n][kolom_breedte=xs]</text:p>
          </table:table-cell>
          <table:table-cell office:value-type="string">
            <text:p>Group [details=n][kolom=j][filter_label=Group]</text:p>
          </table:table-cell>
          <table:table-cell office:value-type="string">
            <text:p>Configuration [details=n][kolom=j] </text:p>
          </table:table-cell>
          <table:table-cell office:value-type="string">
            <text:p>MTOM [details=n][kolom=o][filter=n][kolom_breedte=s]</text:p>
          </table:table-cell>
          <table:table-cell office:value-type="string">
            <text:p>MLM [details=n][kolom=o][filter=n][kolom_breedte=s]</text:p>
          </table:table-cell>
          <table:table-cell office:value-type="string">
            <text:p>ICAO-code [details=n][kolom=o][filter=n][kolom_breedte=xs]</text:p>
          </table:table-cell>
          <table:table-cell office:value-type="string">
            <text:p>AOC [details=n][kolom=o][filter=n][kolom_breedte=xs]</text:p>
          </table:table-cell>
          <table:table-cell office:value-type="string">
            <text:p>83Bis [details=n][kolom=o][filter=n][kolom_breedte=xs]</text:p>
          </table:table-cell>
          <table:table-cell office:value-type="string">
            <text:p>Representative [ kolom=n][details=n][filter_label=Representative in NL]</text:p>
          </table:table-cell>
          <table:table-cell office:value-type="string">
            <text:p>Mortgage [details=n][kolom=o][filter=n][kolom_breedte=xs]</text:p>
          </table:table-cell>
          <table:table-cell office:value-type="string">
            <text:p>Volume [details=n][kolom=o][filter=n][kolom_breedte=s]</text:p>
          </table:table-cell>
          <table:table-cell office:value-type="string">
            <text:p>LegalBase [details=n][kolom=o][filter_label=Legal base]</text:p>
          </table:table-cell>
          <table:table-cell office:value-type="string">
            <text:p>Engines [details=n][kolom=o][filter=j][kolom_breedte=xs]</text:p>
          </table:table-cell>
          <table:table-cell office:value-type="string">
            <text:p>EngKind [details=n][kolom=o][filter=n]</text:p>
          </table:table-cell>
          <table:table-cell office:value-type="string">
            <text:p>EngManufacturer [details=n][kolom=o][filter=n]</text:p>
          </table:table-cell>
          <table:table-cell office:value-type="string">
            <text:p>EngModel [details=n][kolom=o][filter=n]</text:p>
          </table:table-cell>
          <table:table-cell office:value-type="string">
            <text:p>Props [details=n][kolom=o][filter=n][kolom_breedte=xs]</text:p>
          </table:table-cell>
          <table:table-cell office:value-type="string">
            <text:p>PropKind [details=n][kolom=o][filter=n]</text:p>
          </table:table-cell>
          <table:table-cell office:value-type="string">
            <text:p>PropManufacturer [details=n][kolom=o][filter=n]</text:p>
          </table:table-cell>
          <table:table-cell office:value-type="string">
            <text:p>PropModel [details=n][kolom=o][filter=n]</text:p>
          </table:table-cell>
          <table:table-cell office:value-type="string">
            <text:p>NoiseRequirements [details=n][kolom=o][filter=n]</text:p>
          </table:table-cell>
          <table:table-cell office:value-type="string">
            <text:p>NoiseCat [details=n][kolom=o][filter=n][kolom_breedte=xs]</text:p>
          </table:table-cell>
          <table:table-cell office:value-type="string">
            <text:p>NoiseRcrd [details=n][kolom=o][filter=n][kolom_breedte=s]</text:p>
          </table:table-cell>
          <table:table-cell office:value-type="string">
            <text:p>LevelApp [details=n][kolom=o][filter=n][kolom_breedte=s]</text:p>
          </table:table-cell>
          <table:table-cell office:value-type="string">
            <text:p>LevelFo [details=n][kolom=o][filter=n][kolom_breedte=s]</text:p>
          </table:table-cell>
          <table:table-cell office:value-type="string">
            <text:p>LevelOf [details=n][kolom=o][filter=n][kolom_breedte=s]</text:p>
          </table:table-cell>
          <table:table-cell office:value-type="string">
            <text:p>LevelSl [details=n][kolom=o][filter=n][kolom_breedte=s]</text:p>
          </table:table-cell>
          <table:table-cell office:value-type="string">
            <text:p>LevelTo [details=n][kolom=o][filter=n][kolom_breedte=s]</text:p>
          </table:table-cell>
          <table:table-cell office:value-type="string">
            <text:p>RegistrIssued [details=n][kolom=o][filter=n]</text:p>
          </table:table-cell>
          <table:table-cell office:value-type="string">
            <text:p>RegistrExpiry [details=n][kolom=o][filter=n]</text:p>
          </table:table-cell>
          <table:table-cell office:value-type="string">
            <text:p>CofA (Form24/25)_Iss. [details=n][kolom=o][filter=n][kolom</text:p>
          </table:table-cell>
          <table:table-cell office:value-type="string">
            <text:p>AirwIssued [details=n][kolom=o][filter=n]</text:p>
          </table:table-cell>
          <table:table-cell office:value-type="string">
            <text:p>AirwExpiry [details=n][kolom=j][filter=n]</text:p>
          </table:table-cell>
          <table:table-cell office:value-type="string">
            <text:p>AirwKind [details=n][kolom=o][filter=n]</text:p>
          </table:table-cell>
          <table:table-cell office:value-type="string">
            <text:p>AirwVal [details=n][kolom=o][filter_label=Airworthiness valid]</text:p>
          </table:table-cell>
          <table:table-cell office:value-type="string">
            <text:p>NoiseIssued [details=n][kolom=o][filter=n]</text:p>
          </table:table-cell>
          <table:table-cell office:value-type="string">
            <text:p>NoiseExpiry [details=n][kolom=o][filter=n]</text:p>
          </table:table-cell>
          <table:table-cell office:value-type="string">
            <text:p>RegBlock [filter=j][kolom=o][details=n][filter_label=Registration block]</text:p>
          </table:table-cell>
          <table:table-cell office:value-type="string">
            <text:p>Site2Title [details=j][kolom=n][detail_label=Mark - manufacturer - model:][filter=n][titel=j]</text:p>
          </table:table-cell>
          <table:table-cell office:value-type="string">
            <text:p>Site2Descr1 [details=i][kolom=n][detail_label=Serial, built:][filter=n]</text:p>
          </table:table-cell>
          <table:table-cell office:value-type="string">
            <text:p>Site2Descr2 [details=i][kolom=n][detail_label=Registration data:][filter=n]</text:p>
          </table:table-cell>
          <table:table-cell office:value-type="string">
            <text:p>Site2Tech1 [details=i][kolom=n][detail_label=Technical data:][filter=n]</text:p>
          </table:table-cell>
          <table:table-cell office:value-type="string">
            <text:p>Site2Tech2 [details=i][kolom=n][detail_label=Grouping:][filter=n]</text:p>
          </table:table-cell>
          <table:table-cell office:value-type="string">
            <text:p>Site2Tech3 [details=i][kolom=n][detail_label=Masses:][filter=n]</text:p>
          </table:table-cell>
          <table:table-cell office:value-type="string">
            <text:p>Site2Tech4 [details=i][kolom=n][detail_label=Engine(s):][filter=n]</text:p>
          </table:table-cell>
          <table:table-cell office:value-type="string">
            <text:p>Site2Tech5 [details=i][kolom=n][detail_label=Propeller(s):][filter=n]</text:p>
          </table:table-cell>
          <table:table-cell office:value-type="string">
            <text:p>Site2Noise1 [details=i][kolom=n][detail_label=Noise reference:][filter=n]</text:p>
          </table:table-cell>
          <table:table-cell office:value-type="string">
            <text:p>Site2Noise2 [details=i][kolom=n][detail_label=Noise level(s):][filter=n]</text:p>
          </table:table-cell>
          <table:table-cell office:value-type="string">
            <text:p>Site2Doc1 [details=i][kolom=n][detail_label=Document registration:][filter=n]</text:p>
          </table:table-cell>
          <table:table-cell office:value-type="string">
            <text:p>Site2Doc2 [details=j][kolom=n][detail_label=Document airworthiness:][filter=n]</text:p>
          </table:table-cell>
          <table:table-cell office:value-type="string">
            <text:p>Site2Doc3 [details=i][kolom=n][detail_label=Document noise:][filter=n]</text:p>
          </table:table-cell>
        </table:table-row>
        <table:table-row>
          <table:table-cell office:value-type="string">
            <text:p>1 Info</text:p>
          </table:table-cell>
          <table:table-cell office:value-type="string">
            <text:p>Information</text:p>
          </table:table-cell>
          <table:table-cell table:number-columns-repeated="2"/>
          <table:table-cell office:value-type="string">
            <text:p/>
          </table:table-cell>
          <table:table-cell office:value-type="string">
            <text:p/>
          </table:table-cell>
          <table:table-cell office:value-type="string">
            <text:p>See details for explanation, download et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table:table-cell office:value-type="string">
            <text:p/>
          </table:table-cell>
          <table:table-cell office:value-type="string">
            <text:p/>
          </table:table-cell>
          <table:table-cell table:number-columns-repeated="2"/>
          <table:table-cell office:value-type="string">
            <text:p/>
          </table:table-cell>
          <table:table-cell office:value-type="string">
            <text:p/>
          </table:table-cell>
          <table:table-cell/>
          <table:table-cell office:value-type="string">
            <text:p/>
          </table:table-cell>
          <table:table-cell office:value-type="string">
            <text:p/>
          </table:table-cell>
          <table:table-cell office:value-type="string">
            <text:p>Information about the shown data (ignore the labels):</text:p>
          </table:table-cell>
          <table:table-cell office:value-type="string">
            <text:p/>
          </table:table-cell>
          <table:table-cell office:value-type="string">
            <text:p>The data shows several columns. 'Flag' is used to distinguish between deregistered, new, changed and unchanged ('-') aircraft in the preceding 28 days.</text:p>
          </table:table-cell>
          <table:table-cell office:value-type="string">
            <text:p>You can download this data for analysis (including a legenda and alternative column names):</text:p>
          </table:table-cell>
          <table:table-cell office:value-type="string">
            <text:p>https://www.ilent.nl/documenten/webapps/lijsten/luchtvaart/databestanden/luchtvaartregister-data</text:p>
          </table:table-cell>
          <table:table-cell office:value-type="string">
            <text:p>Open this link and download/open the file. The first 2 sheets contain the data and the legenda in traditional spreadsheet view. Additional sheets contain the (un)available markings and a useful replacement for the header in sheet #1.</text:p>
          </table:table-cell>
          <table:table-cell office:value-type="string">
            <text:p>When you enter text in the 'search' area, this will filter the records with this text (even if this text is not directly visible). Using wild cards or filter specific in a certain field (beside on the left) is not possible.</text:p>
          </table:table-cell>
          <table:table-cell office:value-type="string">
            <text:p>You can enable/disable fields (columns) which are appropriate for your situation, however the sequence of the columns is fixed.</text:p>
          </table:table-cell>
          <table:table-cell office:value-type="string">
            <text:p>You can order ascending or descending on each column. Unfortunately this does not work properly if this column has empty records or is numeric with different numbers of digits (e.g. 450, 3500 and 11000).</text:p>
          </table:table-cell>
          <table:table-cell office:value-type="string">
            <text:p/>
          </table:table-cell>
          <table:table-cell office:value-type="string">
            <text:p>29.09.2025: the used markings for (powered) sailplanes is available in the download. It is now possible to apply for a specific registration marking.</text:p>
          </table:table-cell>
          <table:table-cell office:value-type="string">
            <text:p>20.10.2025: the used markings for MLA's, MLG's and paramotors is available in the download. It is now possible to apply for a specific registration marking.</text:p>
          </table:table-cell>
          <table:table-cell office:value-type="string">
            <text:p>If you have comments or suggestions do not hesitate to contact us via info.register@ilent.nl</text:p>
          </table:table-cell>
        </table:table-row>
        <table:table-row>
          <table:table-cell office:value-type="string">
            <text:p>5 -</text:p>
          </table:table-cell>
          <table:table-cell office:value-type="string">
            <text:p>PH-ABA</text:p>
          </table:table-cell>
          <table:table-cell office:value-type="date" office:date-value="2021-05-27T04:00:00">
            <text:p>2021-05-27T04:00:00</text:p>
          </table:table-cell>
          <table:table-cell office:value-type="date" office:date-value="2022-04-22T04:00:00">
            <text:p>2022-04-22T04:00:00</text:p>
          </table:table-cell>
          <table:table-cell office:value-type="string">
            <text:p>United Kingdom</text:p>
          </table:table-cell>
          <table:table-cell office:value-type="string">
            <text:p>G-EIWT</text:p>
          </table:table-cell>
          <table:table-cell office:value-type="string">
            <text:p>Reims Aviation S.A.</text:p>
          </table:table-cell>
          <table:table-cell office:value-type="string">
            <text:p>France</text:p>
          </table:table-cell>
          <table:table-cell office:value-type="string">
            <text:p>FR182</text:p>
          </table:table-cell>
          <table:table-cell office:value-type="string">
            <text:p>FR18200052</text:p>
          </table:table-cell>
          <table:table-cell office:value-type="string">
            <text:p>4863DF</text:p>
          </table:table-cell>
          <table:table-cell office:value-type="string">
            <text:p>1980</text:p>
          </table:table-cell>
          <table:table-cell office:value-type="string">
            <text:p>Small aeroplane</text:p>
          </table:table-cell>
          <table:table-cell office:value-type="string">
            <text:p>Prop-driven (piston/rotor)</text:p>
          </table:table-cell>
          <table:table-cell office:value-type="string">
            <text:p>  1406</text:p>
          </table:table-cell>
          <table:table-cell office:value-type="string">
            <text:p>  1406</text:p>
          </table:table-cell>
          <table:table-cell office:value-type="string">
            <text:p>C82R</text:p>
          </table:table-cell>
          <table:table-cell office:value-type="string">
            <text:p/>
          </table:table-cell>
          <table:table-cell office:value-type="string">
            <text:p/>
          </table:table-cell>
          <table:table-cell office:value-type="string">
            <text:p>X</text:p>
          </table:table-cell>
          <table:table-cell office:value-type="string">
            <text:p/>
          </table:table-cell>
          <table:table-cell office:value-type="string">
            <text:p/>
          </table:table-cell>
          <table:table-cell office:value-type="string">
            <text:p>EASA</text:p>
          </table:table-cell>
          <table:table-cell office:value-type="string">
            <text:p>1</text:p>
          </table:table-cell>
          <table:table-cell office:value-type="string">
            <text:p>Reciprocating piston-driven engine</text:p>
          </table:table-cell>
          <table:table-cell office:value-type="string">
            <text:p>AVCO Corporation, Lycoming Division</text:p>
          </table:table-cell>
          <table:table-cell office:value-type="string">
            <text:p>O-540-J3C5D</text:p>
          </table:table-cell>
          <table:table-cell office:value-type="string">
            <text:p>1</text:p>
          </table:table-cell>
          <table:table-cell office:value-type="string">
            <text:p>Constant speed, 2-bladed</text:p>
          </table:table-cell>
          <table:table-cell office:value-type="string">
            <text:p>McCauley Propeller Systems, Inc.</text:p>
          </table:table-cell>
          <table:table-cell office:value-type="string">
            <text:p>B2D34C218</text:p>
          </table:table-cell>
          <table:table-cell office:value-type="string">
            <text:p>Chapter 6</text:p>
          </table:table-cell>
          <table:table-cell office:value-type="string">
            <text:p>4</text:p>
          </table:table-cell>
          <table:table-cell office:value-type="string">
            <text:p>C1361</text:p>
          </table:table-cell>
          <table:table-cell office:value-type="string">
            <text:p/>
          </table:table-cell>
          <table:table-cell office:value-type="string">
            <text:p/>
          </table:table-cell>
          <table:table-cell office:value-type="string">
            <text:p>70,6</text:p>
          </table:table-cell>
          <table:table-cell office:value-type="string">
            <text:p/>
          </table:table-cell>
          <table:table-cell office:value-type="string">
            <text:p/>
          </table:table-cell>
          <table:table-cell office:value-type="date" office:date-value="2022-04-22T04:00:00">
            <text:p>2022-04-22T04:00:00</text:p>
          </table:table-cell>
          <table:table-cell office:value-type="string">
            <text:p/>
          </table:table-cell>
          <table:table-cell office:value-type="string">
            <text:p>2021-05-27</text:p>
          </table:table-cell>
          <table:table-cell office:value-type="date" office:date-value="2025-05-23T04:00:00">
            <text:p>2025-05-23T04:00:00</text:p>
          </table:table-cell>
          <table:table-cell office:value-type="date" office:date-value="2026-05-26T04:00:00">
            <text:p>2026-05-26T04:00:00</text:p>
          </table:table-cell>
          <table:table-cell office:value-type="string">
            <text:p>ARC 15C</text:p>
          </table:table-cell>
          <table:table-cell office:value-type="string">
            <text:p>Y</text:p>
          </table:table-cell>
          <table:table-cell office:value-type="date" office:date-value="2021-05-27T04:00:00">
            <text:p>2021-05-27T04:00:00</text:p>
          </table:table-cell>
          <table:table-cell office:value-type="string">
            <text:p/>
          </table:table-cell>
          <table:table-cell office:value-type="string">
            <text:p>4. Others</text:p>
          </table:table-cell>
          <table:table-cell office:value-type="string">
            <text:p>PH-ABA - Reims Aviation S.A. FR182</text:p>
          </table:table-cell>
          <table:table-cell office:value-type="string">
            <text:p>Serial number: FR18200052, built: 1980 (France)</text:p>
          </table:table-cell>
          <table:table-cell office:value-type="string">
            <text:p>Registered: 27-05-2021, latest parties change: 22-04-2022, previous: United Kingdom: G-EIWT</text:p>
          </table:table-cell>
          <table:table-cell office:value-type="string">
            <text:p>Legal base: EASA, ICAO type: C82R, HEX: 4863DF</text:p>
          </table:table-cell>
          <table:table-cell office:value-type="string">
            <text:p>Group: Small aeroplane, configuration: Prop-driven (piston/rotor)</text:p>
          </table:table-cell>
          <table:table-cell office:value-type="string">
            <text:p>MTOM/MLM: 1406 kg</text:p>
          </table:table-cell>
          <table:table-cell office:value-type="string">
            <text:p>1 AVCO Corporation, Lycoming Division O-540-J3C5D (Reciprocating piston-driven)</text:p>
          </table:table-cell>
          <table:table-cell office:value-type="string">
            <text:p>1 McCauley Propeller Systems, Inc. B2D34C218 (Constant speed, 2-bladed)</text:p>
          </table:table-cell>
          <table:table-cell office:value-type="string">
            <text:p>Chapter 6, EASA record: C1361</text:p>
          </table:table-cell>
          <table:table-cell office:value-type="string">
            <text:p>OF: 70,6, noise category: 4</text:p>
          </table:table-cell>
          <table:table-cell office:value-type="string">
            <text:p>22-04-2022</text:p>
          </table:table-cell>
          <table:table-cell office:value-type="string">
            <text:p>CofA: 27-05-2021, ARC 15C: 23-05-2025 through 26-05-2026</text:p>
          </table:table-cell>
          <table:table-cell office:value-type="string">
            <text:p>27-05-2021</text:p>
          </table:table-cell>
        </table:table-row>
        <table:table-row>
          <table:table-cell office:value-type="string">
            <text:p>5 -</text:p>
          </table:table-cell>
          <table:table-cell office:value-type="string">
            <text:p>PH-AKA</text:p>
          </table:table-cell>
          <table:table-cell office:value-type="date" office:date-value="2012-02-29T05:00:00">
            <text:p>2012-02-29T05:00:00</text:p>
          </table:table-cell>
          <table:table-cell/>
          <table:table-cell office:value-type="string">
            <text:p/>
          </table:table-cell>
          <table:table-cell office:value-type="string">
            <text:p/>
          </table:table-cell>
          <table:table-cell office:value-type="string">
            <text:p>Airbus S.A.S. (Société par Actions Simplifiée)</text:p>
          </table:table-cell>
          <table:table-cell office:value-type="string">
            <text:p>France</text:p>
          </table:table-cell>
          <table:table-cell office:value-type="string">
            <text:p>A330-303</text:p>
          </table:table-cell>
          <table:table-cell office:value-type="string">
            <text:p>1287</text:p>
          </table:table-cell>
          <table:table-cell office:value-type="string">
            <text:p>484F71</text:p>
          </table:table-cell>
          <table:table-cell office:value-type="string">
            <text:p>2012</text:p>
          </table:table-cell>
          <table:table-cell office:value-type="string">
            <text:p>Large aeroplane</text:p>
          </table:table-cell>
          <table:table-cell office:value-type="string">
            <text:p>Turbo fan</text:p>
          </table:table-cell>
          <table:table-cell office:value-type="string">
            <text:p>227000</text:p>
          </table:table-cell>
          <table:table-cell office:value-type="string">
            <text:p>187000</text:p>
          </table:table-cell>
          <table:table-cell office:value-type="string">
            <text:p>A333</text:p>
          </table:table-cell>
          <table:table-cell office:value-type="string">
            <text:p>X</text:p>
          </table:table-cell>
          <table:table-cell office:value-type="string">
            <text:p/>
          </table:table-cell>
          <table:table-cell office:value-type="string">
            <text:p/>
          </table:table-cell>
          <table:table-cell office:value-type="string">
            <text:p>X</text:p>
          </table:table-cell>
          <table:table-cell office:value-type="string">
            <text:p/>
          </table:table-cell>
          <table:table-cell office:value-type="string">
            <text:p>EASA</text:p>
          </table:table-cell>
          <table:table-cell office:value-type="string">
            <text:p>2</text:p>
          </table:table-cell>
          <table:table-cell office:value-type="string">
            <text:p>Turbofan engine</text:p>
          </table:table-cell>
          <table:table-cell office:value-type="string">
            <text:p>General Electric Company, Aircraft Engine Group</text:p>
          </table:table-cell>
          <table:table-cell office:value-type="string">
            <text:p>CF6-80E1A3</text:p>
          </table:table-cell>
          <table:table-cell office:value-type="string">
            <text:p>-</text:p>
          </table:table-cell>
          <table:table-cell office:value-type="string">
            <text:p/>
          </table:table-cell>
          <table:table-cell office:value-type="string">
            <text:p/>
          </table:table-cell>
          <table:table-cell office:value-type="string">
            <text:p/>
          </table:table-cell>
          <table:table-cell office:value-type="string">
            <text:p>Chapter 4</text:p>
          </table:table-cell>
          <table:table-cell office:value-type="string">
            <text:p/>
          </table:table-cell>
          <table:table-cell office:value-type="string">
            <text:p>A81867</text:p>
          </table:table-cell>
          <table:table-cell office:value-type="string">
            <text:p>99,1</text:p>
          </table:table-cell>
          <table:table-cell office:value-type="string">
            <text:p>91,4</text:p>
          </table:table-cell>
          <table:table-cell office:value-type="string">
            <text:p/>
          </table:table-cell>
          <table:table-cell office:value-type="string">
            <text:p>99,7</text:p>
          </table:table-cell>
          <table:table-cell office:value-type="string">
            <text:p/>
          </table:table-cell>
          <table:table-cell office:value-type="date" office:date-value="2025-01-22T05:00:00">
            <text:p>2025-01-22T05:00:00</text:p>
          </table:table-cell>
          <table:table-cell office:value-type="string">
            <text:p>2028-03-19</text:p>
          </table:table-cell>
          <table:table-cell office:value-type="string">
            <text:p>2012-02-29</text:p>
          </table:table-cell>
          <table:table-cell office:value-type="date" office:date-value="2026-01-29T05:00:00">
            <text:p>2026-01-29T05:00:00</text:p>
          </table:table-cell>
          <table:table-cell office:value-type="date" office:date-value="2027-02-28T05:00:00">
            <text:p>2027-02-28T05:00:00</text:p>
          </table:table-cell>
          <table:table-cell office:value-type="string">
            <text:p>ARC 15B</text:p>
          </table:table-cell>
          <table:table-cell office:value-type="string">
            <text:p>Y</text:p>
          </table:table-cell>
          <table:table-cell office:value-type="date" office:date-value="2025-10-28T04:00:00">
            <text:p>2025-10-28T04:00:00</text:p>
          </table:table-cell>
          <table:table-cell office:value-type="string">
            <text:p/>
          </table:table-cell>
          <table:table-cell office:value-type="string">
            <text:p>4. Others</text:p>
          </table:table-cell>
          <table:table-cell office:value-type="string">
            <text:p>PH-AKA - Airbus S.A.S. (Société par Actions Simplifiée) A330-303</text:p>
          </table:table-cell>
          <table:table-cell office:value-type="string">
            <text:p>Serial number: 1287, built: 2012 (France)</text:p>
          </table:table-cell>
          <table:table-cell office:value-type="string">
            <text:p>Registered: 29-02-2012  (AOC)  (Mortgaged)</text:p>
          </table:table-cell>
          <table:table-cell office:value-type="string">
            <text:p>Legal base: EASA, ICAO type: A333, HEX: 484F71</text:p>
          </table:table-cell>
          <table:table-cell office:value-type="string">
            <text:p>Group: Large aeroplane, configuration: Turbo fan</text:p>
          </table:table-cell>
          <table:table-cell office:value-type="string">
            <text:p>MTOM: 227000, MLM: 187000 kg</text:p>
          </table:table-cell>
          <table:table-cell office:value-type="string">
            <text:p>2 General Electric Company, Aircraft Engine Group CF6-80E1A3 (Turbofan)</text:p>
          </table:table-cell>
          <table:table-cell office:value-type="string">
            <text:p/>
          </table:table-cell>
          <table:table-cell office:value-type="string">
            <text:p>Chapter 4, EASA record: A81867</text:p>
          </table:table-cell>
          <table:table-cell office:value-type="string">
            <text:p>APPR: 99,1 FO: 91,4 SL (LFP): 99,7</text:p>
          </table:table-cell>
          <table:table-cell office:value-type="string">
            <text:p>22-01-2025 (expiry: 19-03-2028)</text:p>
          </table:table-cell>
          <table:table-cell office:value-type="string">
            <text:p>CofA: 29-02-2012, ARC 15B: 29-01-2026 through 28-02-2027</text:p>
          </table:table-cell>
          <table:table-cell office:value-type="string">
            <text:p>28-10-2025</text:p>
          </table:table-cell>
        </table:table-row>
        <table:table-row>
          <table:table-cell office:value-type="string">
            <text:p>5 -</text:p>
          </table:table-cell>
          <table:table-cell office:value-type="string">
            <text:p>PH-80</text:p>
          </table:table-cell>
          <table:table-cell office:value-type="date" office:date-value="2012-01-13T05:00:00">
            <text:p>2012-01-13T05:00:00</text:p>
          </table:table-cell>
          <table:table-cell office:value-type="date" office:date-value="2025-06-16T04:00:00">
            <text:p>2025-06-16T04:00:00</text:p>
          </table:table-cell>
          <table:table-cell office:value-type="string">
            <text:p/>
          </table:table-cell>
          <table:table-cell office:value-type="string">
            <text:p/>
          </table:table-cell>
          <table:table-cell office:value-type="string">
            <text:p>Minimoa Syndicaat Hilversum</text:p>
          </table:table-cell>
          <table:table-cell office:value-type="string">
            <text:p>The Netherlands</text:p>
          </table:table-cell>
          <table:table-cell office:value-type="string">
            <text:p>Go 3 "Minimoa"</text:p>
          </table:table-cell>
          <table:table-cell office:value-type="string">
            <text:p>NVAVBP085</text:p>
          </table:table-cell>
          <table:table-cell office:value-type="string">
            <text:p>484F8C</text:p>
          </table:table-cell>
          <table:table-cell office:value-type="string">
            <text:p>2011</text:p>
          </table:table-cell>
          <table:table-cell office:value-type="string">
            <text:p>Sailplane</text:p>
          </table:table-cell>
          <table:table-cell office:value-type="string">
            <text:p>Glider</text:p>
          </table:table-cell>
          <table:table-cell office:value-type="string">
            <text:p>   350</text:p>
          </table:table-cell>
          <table:table-cell office:value-type="string">
            <text:p>   350</text:p>
          </table:table-cell>
          <table:table-cell office:value-type="string">
            <text:p>GLI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nnex I</text:p>
          </table:table-cell>
          <table:table-cell office:value-type="string">
            <text:p>-</text:p>
          </table:table-cell>
          <table:table-cell office:value-type="string">
            <text:p/>
          </table:table-cell>
          <table:table-cell office:value-type="string">
            <text:p/>
          </table:table-cell>
          <table:table-cell office:value-type="string">
            <text:p/>
          </table:table-cell>
          <table:table-cell office:value-type="string">
            <text: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date" office:date-value="2025-06-16T04:00:00">
            <text:p>2025-06-16T04:00:00</text:p>
          </table:table-cell>
          <table:table-cell office:value-type="string">
            <text:p/>
          </table:table-cell>
          <table:table-cell office:value-type="string">
            <text:p/>
          </table:table-cell>
          <table:table-cell office:value-type="date" office:date-value="2025-12-17T05:00:00">
            <text:p>2025-12-17T05:00:00</text:p>
          </table:table-cell>
          <table:table-cell office:value-type="date" office:date-value="2027-01-13T05:00:00">
            <text:p>2027-01-13T05:00:00</text:p>
          </table:table-cell>
          <table:table-cell office:value-type="string">
            <text:p>Speciaal BVL</text:p>
          </table:table-cell>
          <table:table-cell office:value-type="string">
            <text:p>Y</text:p>
          </table:table-cell>
          <table:table-cell/>
          <table:table-cell office:value-type="string">
            <text:p/>
          </table:table-cell>
          <table:table-cell office:value-type="string">
            <text:p>3. Sailplanes</text:p>
          </table:table-cell>
          <table:table-cell office:value-type="string">
            <text:p>PH-80 - Minimoa Syndicaat Hilversum Go 3 "Minimoa"</text:p>
          </table:table-cell>
          <table:table-cell office:value-type="string">
            <text:p>Serial number: NVAVBP085, built: 2011 (The Netherlands)</text:p>
          </table:table-cell>
          <table:table-cell office:value-type="string">
            <text:p>Registered: 13-01-2012, latest parties change: 16-06-2025</text:p>
          </table:table-cell>
          <table:table-cell office:value-type="string">
            <text:p>Legal base: Annex I, ICAO type: GLID, HEX: 484F8C</text:p>
          </table:table-cell>
          <table:table-cell office:value-type="string">
            <text:p>Group: Sailplane, configuration: Glider</text:p>
          </table:table-cell>
          <table:table-cell office:value-type="string">
            <text:p>MTOM/MLM: 350 k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6-06-2025</text:p>
          </table:table-cell>
          <table:table-cell office:value-type="string">
            <text:p>Speciaal BVL: 17-12-2025 through 13-01-2027</text:p>
          </table:table-cell>
          <table:table-cell office:value-type="string">
            <text:p/>
          </table:table-cell>
        </table:table-row>
        <table:table-row>
          <table:table-cell office:value-type="string">
            <text:p>5 -</text:p>
          </table:table-cell>
          <table:table-cell office:value-type="string">
            <text:p>PH-0A0</text:p>
          </table:table-cell>
          <table:table-cell office:value-type="date" office:date-value="2021-01-28T05:00:00">
            <text:p>2021-01-28T05:00:00</text:p>
          </table:table-cell>
          <table:table-cell/>
          <table:table-cell office:value-type="string">
            <text:p/>
          </table:table-cell>
          <table:table-cell office:value-type="string">
            <text:p/>
          </table:table-cell>
          <table:table-cell office:value-type="string">
            <text:p>Porto Aviation Group S.r.l.</text:p>
          </table:table-cell>
          <table:table-cell office:value-type="string">
            <text:p>Italy</text:p>
          </table:table-cell>
          <table:table-cell office:value-type="string">
            <text:p>Risen</text:p>
          </table:table-cell>
          <table:table-cell office:value-type="string">
            <text:p>15</text:p>
          </table:table-cell>
          <table:table-cell office:value-type="string">
            <text:p>4862A1</text:p>
          </table:table-cell>
          <table:table-cell office:value-type="string">
            <text:p>2021</text:p>
          </table:table-cell>
          <table:table-cell office:value-type="string">
            <text:p>MLA, MLH</text:p>
          </table:table-cell>
          <table:table-cell office:value-type="string">
            <text:p>Micro light aeroplane</text:p>
          </table:table-cell>
          <table:table-cell office:value-type="string">
            <text:p>   600</text:p>
          </table:table-cell>
          <table:table-cell office:value-type="string">
            <text:p>   600</text:p>
          </table:table-cell>
          <table:table-cell office:value-type="string">
            <text:p>RIS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nnex I</text:p>
          </table:table-cell>
          <table:table-cell office:value-type="string">
            <text:p>1</text:p>
          </table:table-cell>
          <table:table-cell office:value-type="string">
            <text:p>Reciprocating piston-driven engine</text:p>
          </table:table-cell>
          <table:table-cell office:value-type="string">
            <text:p>BRP - Powertrain GmbH &amp; Co KG</text:p>
          </table:table-cell>
          <table:table-cell office:value-type="string">
            <text:p>912 iS</text:p>
          </table:table-cell>
          <table:table-cell office:value-type="string">
            <text:p>1</text:p>
          </table:table-cell>
          <table:table-cell office:value-type="string">
            <text:p>Constant speed, 2-bladed</text:p>
          </table:table-cell>
          <table:table-cell office:value-type="string">
            <text:p>Alisport Srl</text:p>
          </table:table-cell>
          <table:table-cell office:value-type="string">
            <text:p>Idrovario</text:p>
          </table:table-cell>
          <table:table-cell office:value-type="string">
            <text:p>Chapter 10 (10.4b)</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67,6</text:p>
          </table:table-cell>
          <table:table-cell office:value-type="date" office:date-value="2021-01-28T05:00:00">
            <text:p>2021-01-28T05:00:00</text:p>
          </table:table-cell>
          <table:table-cell office:value-type="string">
            <text:p/>
          </table:table-cell>
          <table:table-cell office:value-type="string">
            <text:p/>
          </table:table-cell>
          <table:table-cell office:value-type="date" office:date-value="2025-11-07T05:00:00">
            <text:p>2025-11-07T05:00:00</text:p>
          </table:table-cell>
          <table:table-cell office:value-type="date" office:date-value="2027-01-27T05:00:00">
            <text:p>2027-01-27T05:00:00</text:p>
          </table:table-cell>
          <table:table-cell office:value-type="string">
            <text:p>Speciaal BVL</text:p>
          </table:table-cell>
          <table:table-cell office:value-type="string">
            <text:p>Y</text:p>
          </table:table-cell>
          <table:table-cell/>
          <table:table-cell office:value-type="string">
            <text:p/>
          </table:table-cell>
          <table:table-cell office:value-type="string">
            <text:p>2. Microlights</text:p>
          </table:table-cell>
          <table:table-cell office:value-type="string">
            <text:p>PH-0A0 - Porto Aviation Group S.r.l. Risen</text:p>
          </table:table-cell>
          <table:table-cell office:value-type="string">
            <text:p>Serial number: 15, built: 2021 (Italy)</text:p>
          </table:table-cell>
          <table:table-cell office:value-type="string">
            <text:p>Registered: 28-01-2021</text:p>
          </table:table-cell>
          <table:table-cell office:value-type="string">
            <text:p>Legal base: Annex I, ICAO type: RISN, HEX: 4862A1</text:p>
          </table:table-cell>
          <table:table-cell office:value-type="string">
            <text:p>Group: MLA, MLH, configuration: Micro light aeroplane</text:p>
          </table:table-cell>
          <table:table-cell office:value-type="string">
            <text:p>MTOM/MLM: 600 kg</text:p>
          </table:table-cell>
          <table:table-cell office:value-type="string">
            <text:p>1 BRP - Powertrain GmbH &amp; Co KG 912 iS (Reciprocating piston-driven)</text:p>
          </table:table-cell>
          <table:table-cell office:value-type="string">
            <text:p>1 Alisport Srl Idrovario (Constant speed, 2-bladed)</text:p>
          </table:table-cell>
          <table:table-cell office:value-type="string">
            <text:p>Chapter 10 (10.4b)</text:p>
          </table:table-cell>
          <table:table-cell office:value-type="string">
            <text:p>TO: 67,6, noise category: 7</text:p>
          </table:table-cell>
          <table:table-cell office:value-type="string">
            <text:p>28-01-2021</text:p>
          </table:table-cell>
          <table:table-cell office:value-type="string">
            <text:p>Speciaal BVL: 07-11-2025 through 27-01-2027</text:p>
          </table:table-cell>
          <table:table-cell office:value-type="string">
            <text:p/>
          </table:table-cell>
        </table:table-row>
        <table:table-row>
          <table:table-cell office:value-type="string">
            <text:p>5 -</text:p>
          </table:table-cell>
          <table:table-cell office:value-type="string">
            <text:p>PH-AAA</text:p>
          </table:table-cell>
          <table:table-cell office:value-type="date" office:date-value="2016-04-08T04:00:00">
            <text:p>2016-04-08T04:00:00</text:p>
          </table:table-cell>
          <table:table-cell/>
          <table:table-cell office:value-type="string">
            <text:p/>
          </table:table-cell>
          <table:table-cell office:value-type="string">
            <text:p/>
          </table:table-cell>
          <table:table-cell office:value-type="string">
            <text:p>Cameron Balloons Ltd.</text:p>
          </table:table-cell>
          <table:table-cell office:value-type="string">
            <text:p>United Kingdom</text:p>
          </table:table-cell>
          <table:table-cell office:value-type="string">
            <text:p>Z-140</text:p>
          </table:table-cell>
          <table:table-cell office:value-type="string">
            <text:p>11974</text:p>
          </table:table-cell>
          <table:table-cell office:value-type="string">
            <text:p>485346</text:p>
          </table:table-cell>
          <table:table-cell office:value-type="string">
            <text:p>2016</text:p>
          </table:table-cell>
          <table:table-cell office:value-type="string">
            <text:p>Balloon</text:p>
          </table:table-cell>
          <table:table-cell office:value-type="string">
            <text:p>Balloon (hot air)</text:p>
          </table:table-cell>
          <table:table-cell office:value-type="string">
            <text:p>  1270</text:p>
          </table:table-cell>
          <table:table-cell office:value-type="string">
            <text:p>  1270</text:p>
          </table:table-cell>
          <table:table-cell office:value-type="string">
            <text:p>BAL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3965</text:p>
          </table:table-cell>
          <table:table-cell office:value-type="string">
            <text:p>EASA</text:p>
          </table:table-cell>
          <table:table-cell office:value-type="string">
            <text:p>-</text:p>
          </table:table-cell>
          <table:table-cell office:value-type="string">
            <text:p/>
          </table:table-cell>
          <table:table-cell office:value-type="string">
            <text:p/>
          </table:table-cell>
          <table:table-cell office:value-type="string">
            <text:p/>
          </table:table-cell>
          <table:table-cell office:value-type="string">
            <text: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date" office:date-value="2016-04-08T04:00:00">
            <text:p>2016-04-08T04:00:00</text:p>
          </table:table-cell>
          <table:table-cell office:value-type="string">
            <text:p/>
          </table:table-cell>
          <table:table-cell office:value-type="string">
            <text:p>2016-04-08</text:p>
          </table:table-cell>
          <table:table-cell office:value-type="date" office:date-value="2026-03-30T04:00:00">
            <text:p>2026-03-30T04:00:00</text:p>
          </table:table-cell>
          <table:table-cell office:value-type="date" office:date-value="2027-04-07T04:00:00">
            <text:p>2027-04-07T04:00:00</text:p>
          </table:table-cell>
          <table:table-cell office:value-type="string">
            <text:p>ARC 15C</text:p>
          </table:table-cell>
          <table:table-cell office:value-type="string">
            <text:p>Y</text:p>
          </table:table-cell>
          <table:table-cell/>
          <table:table-cell office:value-type="string">
            <text:p/>
          </table:table-cell>
          <table:table-cell office:value-type="string">
            <text:p>4. Others</text:p>
          </table:table-cell>
          <table:table-cell office:value-type="string">
            <text:p>PH-AAA - Cameron Balloons Ltd. Z-140</text:p>
          </table:table-cell>
          <table:table-cell office:value-type="string">
            <text:p>Serial number: 11974, built: 2016 (United Kingdom), volume: 3965 m3</text:p>
          </table:table-cell>
          <table:table-cell office:value-type="string">
            <text:p>Registered: 08-04-2016</text:p>
          </table:table-cell>
          <table:table-cell office:value-type="string">
            <text:p>Legal base: EASA, ICAO type: BALL, HEX: 485346</text:p>
          </table:table-cell>
          <table:table-cell office:value-type="string">
            <text:p>Group: Balloon, configuration: Balloon (hot air)</text:p>
          </table:table-cell>
          <table:table-cell office:value-type="string">
            <text:p>MTOM/MLM: 1270 k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4-2016</text:p>
          </table:table-cell>
          <table:table-cell office:value-type="string">
            <text:p>CofA: 08-04-2016, ARC 15C: 30-03-2026 through 07-04-2027</text:p>
          </table:table-cell>
          <table:table-cell office:value-type="string">
            <text:p/>
          </table:table-cell>
        </table:table-row>
        <table:table-row>
          <table:table-cell office:value-type="string">
            <text:p>5 -</text:p>
          </table:table-cell>
          <table:table-cell office:value-type="string">
            <text:p>PH-1DA</text:p>
          </table:table-cell>
          <table:table-cell office:value-type="date" office:date-value="2024-01-10T05:00:00">
            <text:p>2024-01-10T05:00:00</text:p>
          </table:table-cell>
          <table:table-cell/>
          <table:table-cell office:value-type="string">
            <text:p/>
          </table:table-cell>
          <table:table-cell office:value-type="string">
            <text:p/>
          </table:table-cell>
          <table:table-cell office:value-type="string">
            <text:p>Da-Jiang Innovations Science and Technology Co., Ltd.</text:p>
          </table:table-cell>
          <table:table-cell office:value-type="string">
            <text:p>China</text:p>
          </table:table-cell>
          <table:table-cell office:value-type="string">
            <text:p>Mavic 3 Thermal</text:p>
          </table:table-cell>
          <table:table-cell office:value-type="string">
            <text:p>1581F5FJD238100D95NU</text:p>
          </table:table-cell>
          <table:table-cell office:value-type="string">
            <text:p>4859DE</text:p>
          </table:table-cell>
          <table:table-cell office:value-type="string">
            <text:p>2023</text:p>
          </table:table-cell>
          <table:table-cell office:value-type="string">
            <text:p>Drones</text:p>
          </table:table-cell>
          <table:table-cell office:value-type="string">
            <text:p>RPAS - helicopter, electric</text:p>
          </table:table-cell>
          <table:table-cell office:value-type="string">
            <text:p>     1,05</text:p>
          </table:table-cell>
          <table:table-cell office:value-type="string">
            <text:p>     1,05</text:p>
          </table:table-cell>
          <table:table-cell office:value-type="string">
            <text:p>VFH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Others (2.3)</text:p>
          </table:table-cell>
          <table:table-cell office:value-type="string">
            <text:p>4</text:p>
          </table:table-cell>
          <table:table-cell office:value-type="string">
            <text:p>Electrical engine</text:p>
          </table:table-cell>
          <table:table-cell office:value-type="string">
            <text:p>Unknown</text:p>
          </table:table-cell>
          <table:table-cell office:value-type="string">
            <text:p>Electrical - not further defined</text:p>
          </table:table-cell>
          <table:table-cell office:value-type="string">
            <text:p>-</text:p>
          </table:table-cell>
          <table:table-cell office:value-type="string">
            <text:p/>
          </table:table-cell>
          <table:table-cell office:value-type="string">
            <text:p/>
          </table:table-cell>
          <table:table-cell office:value-type="string">
            <text:p/>
          </table:table-cell>
          <table:table-cell office:value-type="string">
            <text:p>No requirements applicab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date" office:date-value="2024-01-10T05:00:00">
            <text:p>2024-01-10T05:00:00</text:p>
          </table:table-cell>
          <table:table-cell office:value-type="string">
            <text:p/>
          </table:table-cell>
          <table:table-cell office:value-type="string">
            <text:p/>
          </table:table-cell>
          <table:table-cell office:value-type="date" office:date-value="2024-09-09T04:00:00">
            <text:p>2024-09-09T04:00:00</text:p>
          </table:table-cell>
          <table:table-cell office:value-type="date" office:date-value="2027-02-14T05:00:00">
            <text:p>2027-02-14T05:00:00</text:p>
          </table:table-cell>
          <table:table-cell office:value-type="string">
            <text:p>Ontheffing</text:p>
          </table:table-cell>
          <table:table-cell office:value-type="string">
            <text:p>Y</text:p>
          </table:table-cell>
          <table:table-cell office:value-type="date" office:date-value="2024-01-10T05:00:00">
            <text:p>2024-01-10T05:00:00</text:p>
          </table:table-cell>
          <table:table-cell office:value-type="string">
            <text:p/>
          </table:table-cell>
          <table:table-cell office:value-type="string">
            <text:p>1. Drones</text:p>
          </table:table-cell>
          <table:table-cell office:value-type="string">
            <text:p>PH-1DA - Da-Jiang Innovations Science and Technology Co., Ltd. Mavic 3 Thermal</text:p>
          </table:table-cell>
          <table:table-cell office:value-type="string">
            <text:p>Serial number: 1581F5FJD238100D95NU, built: 2023 (China)</text:p>
          </table:table-cell>
          <table:table-cell office:value-type="string">
            <text:p>Registered: 10-01-2024</text:p>
          </table:table-cell>
          <table:table-cell office:value-type="string">
            <text:p>Legal base: Others (2.3), ICAO type: VFHC, HEX: 4859DE</text:p>
          </table:table-cell>
          <table:table-cell office:value-type="string">
            <text:p>Group: Drones, configuration: RPAS - helicopter, electric</text:p>
          </table:table-cell>
          <table:table-cell office:value-type="string">
            <text:p>MTOM/MLM: 1,05 kg</text:p>
          </table:table-cell>
          <table:table-cell office:value-type="string">
            <text:p>4 Unknown Electrical - not further defined (Electrical)</text:p>
          </table:table-cell>
          <table:table-cell office:value-type="string">
            <text:p/>
          </table:table-cell>
          <table:table-cell office:value-type="string">
            <text:p>No requirements applicable</text:p>
          </table:table-cell>
          <table:table-cell office:value-type="string">
            <text:p/>
          </table:table-cell>
          <table:table-cell office:value-type="string">
            <text:p>10-01-2024</text:p>
          </table:table-cell>
          <table:table-cell office:value-type="string">
            <text:p>Ontheffing: 09-09-2024 through 14-02-2027</text:p>
          </table:table-cell>
          <table:table-cell office:value-type="string">
            <text:p>10-01-2024</text:p>
          </table:table-cell>
        </table:table-row>
        <table:table-row>
          <table:table-cell office:value-type="string">
            <text:p>5 -</text:p>
          </table:table-cell>
          <table:table-cell office:value-type="string">
            <text:p>PH-AAI</text:p>
          </table:table-cell>
          <table:table-cell office:value-type="date" office:date-value="2021-06-15T04:00:00">
            <text:p>2021-06-15T04:00:00</text:p>
          </table:table-cell>
          <table:table-cell/>
          <table:table-cell office:value-type="string">
            <text:p>France</text:p>
          </table:table-cell>
          <table:table-cell office:value-type="string">
            <text:p>F-HJSC</text:p>
          </table:table-cell>
          <table:table-cell office:value-type="string">
            <text:p>Airbus Helicopters</text:p>
          </table:table-cell>
          <table:table-cell office:value-type="string">
            <text:p>France</text:p>
          </table:table-cell>
          <table:table-cell office:value-type="string">
            <text:p>AS 350 B3</text:p>
          </table:table-cell>
          <table:table-cell office:value-type="string">
            <text:p>8755</text:p>
          </table:table-cell>
          <table:table-cell office:value-type="string">
            <text:p>486397</text:p>
          </table:table-cell>
          <table:table-cell office:value-type="string">
            <text:p>2019</text:p>
          </table:table-cell>
          <table:table-cell office:value-type="string">
            <text:p>Rotorcraft</text:p>
          </table:table-cell>
          <table:table-cell office:value-type="string">
            <text:p>Helicopter (turbine)</text:p>
          </table:table-cell>
          <table:table-cell office:value-type="string">
            <text:p>  2250</text:p>
          </table:table-cell>
          <table:table-cell office:value-type="string">
            <text:p>  2250</text:p>
          </table:table-cell>
          <table:table-cell office:value-type="string">
            <text:p>AS50</text:p>
          </table:table-cell>
          <table:table-cell office:value-type="string">
            <text:p>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ASA</text:p>
          </table:table-cell>
          <table:table-cell office:value-type="string">
            <text:p>1</text:p>
          </table:table-cell>
          <table:table-cell office:value-type="string">
            <text:p>Turbine-driven shaft (rotorcraft) engine</text:p>
          </table:table-cell>
          <table:table-cell office:value-type="string">
            <text:p>Safran Helicopter Engines</text:p>
          </table:table-cell>
          <table:table-cell office:value-type="string">
            <text:p>Arriel 2D</text:p>
          </table:table-cell>
          <table:table-cell office:value-type="string">
            <text:p>-</text:p>
          </table:table-cell>
          <table:table-cell office:value-type="string">
            <text:p/>
          </table:table-cell>
          <table:table-cell office:value-type="string">
            <text:p/>
          </table:table-cell>
          <table:table-cell office:value-type="string">
            <text:p/>
          </table:table-cell>
          <table:table-cell office:value-type="string">
            <text:p>Chapter 11 (11.4.1)</text:p>
          </table:table-cell>
          <table:table-cell office:value-type="string">
            <text:p/>
          </table:table-cell>
          <table:table-cell office:value-type="string">
            <text:p>D338</text:p>
          </table:table-cell>
          <table:table-cell office:value-type="string">
            <text:p/>
          </table:table-cell>
          <table:table-cell office:value-type="string">
            <text:p/>
          </table:table-cell>
          <table:table-cell office:value-type="string">
            <text:p>84,4</text:p>
          </table:table-cell>
          <table:table-cell office:value-type="string">
            <text:p/>
          </table:table-cell>
          <table:table-cell office:value-type="string">
            <text:p/>
          </table:table-cell>
          <table:table-cell office:value-type="date" office:date-value="2021-06-15T04:00:00">
            <text:p>2021-06-15T04:00:00</text:p>
          </table:table-cell>
          <table:table-cell office:value-type="string">
            <text:p/>
          </table:table-cell>
          <table:table-cell office:value-type="string">
            <text:p>2021-06-25</text:p>
          </table:table-cell>
          <table:table-cell office:value-type="date" office:date-value="2025-07-10T04:00:00">
            <text:p>2025-07-10T04:00:00</text:p>
          </table:table-cell>
          <table:table-cell office:value-type="date" office:date-value="2026-07-26T04:00:00">
            <text:p>2026-07-26T04:00:00</text:p>
          </table:table-cell>
          <table:table-cell office:value-type="string">
            <text:p>ARC 15B</text:p>
          </table:table-cell>
          <table:table-cell office:value-type="string">
            <text:p>Y</text:p>
          </table:table-cell>
          <table:table-cell office:value-type="date" office:date-value="2023-12-13T05:00:00">
            <text:p>2023-12-13T05:00:00</text:p>
          </table:table-cell>
          <table:table-cell office:value-type="string">
            <text:p/>
          </table:table-cell>
          <table:table-cell office:value-type="string">
            <text:p>4. Others</text:p>
          </table:table-cell>
          <table:table-cell office:value-type="string">
            <text:p>PH-AAI - Airbus Helicopters AS 350 B3</text:p>
          </table:table-cell>
          <table:table-cell office:value-type="string">
            <text:p>Serial number: 8755, built: 2019 (France)</text:p>
          </table:table-cell>
          <table:table-cell office:value-type="string">
            <text:p>Registered: 15-06-2021, previous: France: F-HJSC  (AOC)</text:p>
          </table:table-cell>
          <table:table-cell office:value-type="string">
            <text:p>Legal base: EASA, ICAO type: AS50, HEX: 486397</text:p>
          </table:table-cell>
          <table:table-cell office:value-type="string">
            <text:p>Group: Rotorcraft, configuration: Helicopter (turbine)</text:p>
          </table:table-cell>
          <table:table-cell office:value-type="string">
            <text:p>MTOM/MLM: 2250 kg</text:p>
          </table:table-cell>
          <table:table-cell office:value-type="string">
            <text:p>1 Safran Helicopter Engines Arriel 2D (Turbine-driven shaft (rotorcraft))</text:p>
          </table:table-cell>
          <table:table-cell office:value-type="string">
            <text:p/>
          </table:table-cell>
          <table:table-cell office:value-type="string">
            <text:p>Chapter 11 (11.4.1), EASA record: D338</text:p>
          </table:table-cell>
          <table:table-cell office:value-type="string">
            <text:p>OF: 84,4</text:p>
          </table:table-cell>
          <table:table-cell office:value-type="string">
            <text:p>15-06-2021</text:p>
          </table:table-cell>
          <table:table-cell office:value-type="string">
            <text:p>CofA: 25-06-2021, ARC 15B: 10-07-2025 through 26-07-2026</text:p>
          </table:table-cell>
          <table:table-cell office:value-type="string">
            <text:p>13-12-2023</text:p>
          </table:table-cell>
        </table:table-row>
        <table:table-row>
          <table:table-cell office:value-type="string">
            <text:p>2 Deregistered</text:p>
          </table:table-cell>
          <table:table-cell office:value-type="string">
            <text:p>PH-2OP</text:p>
          </table:table-cell>
          <table:table-cell table:number-columns-repeated="2"/>
          <table:table-cell office:value-type="string">
            <text:p/>
          </table:table-cell>
          <table:table-cell office:value-type="string">
            <text:p/>
          </table:table-cell>
          <table:table-cell office:value-type="string">
            <text:p>Da-Jiang Innovations Science and Technology Co., Ltd.</text:p>
          </table:table-cell>
          <table:table-cell office:value-type="string">
            <text:p/>
          </table:table-cell>
          <table:table-cell office:value-type="string">
            <text:p>Matrice 350 RTK</text:p>
          </table:table-cell>
          <table:table-cell office:value-type="string">
            <text:p>1581F6GKB238Q004000F</text:p>
          </table:table-cell>
          <table:table-cell office:value-type="string">
            <text:p/>
          </table:table-cell>
          <table:table-cell office:value-type="string">
            <text:p/>
          </table:table-cell>
          <table:table-cell office:value-type="string">
            <text:p>Drones</text:p>
          </table:table-cell>
          <table:table-cell office:value-type="string">
            <text:p>RPAS - helicopter, electric</text:p>
          </table:table-cell>
          <table:table-cell office:value-type="string">
            <text:p>     9,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table:table-cell office:value-type="string">
            <text:p/>
          </table:table-cell>
          <table:table-cell office:value-type="string">
            <text:p/>
          </table:table-cell>
          <table:table-cell table:number-columns-repeated="2"/>
          <table:table-cell office:value-type="string">
            <text:p/>
          </table:table-cell>
          <table:table-cell office:value-type="string">
            <text:p/>
          </table:table-cell>
          <table:table-cell/>
          <table:table-cell office:value-type="string">
            <text:p/>
          </table:table-cell>
          <table:table-cell office:value-type="string">
            <text:p>1. Drones</text:p>
          </table:table-cell>
          <table:table-cell office:value-type="string">
            <text:p>DEREGISTERED: PH-2OP - Da-Jiang Innovations Science and Technology Co., Ltd. Matrice 350 RTK (1581F6GKB238Q004000F)</text:p>
          </table:table-cell>
          <table:table-cell office:value-type="string">
            <text:p/>
          </table:table-cell>
          <table:table-cell office:value-type="string">
            <text:p>Registered : 17-04-2024, deregistered: 02-04-2026 - Written off / withdrawn from us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fo="urn:oasis:names:tc:opendocument:xmlns:xsl-fo-compatible:1.0" xmlns:number="urn:oasis:names:tc:opendocument:xmlns:datastyle:1.0" xmlns:svg="urn:oasis:names:tc:opendocument:xmlns:svg-compatible:1.0" office:version="1.2">
  <office:font-face-decls/>
  <office:styles/>
  <office:automatic-styles/>
  <office:master-styles/>
</office:document-styles>
</file>

<file path=meta.xml><?xml version="1.0" encoding="utf-8"?>
<office:document-meta xmlns:office="urn:oasis:names:tc:opendocument:xmlns:office:1.0" xmlns:meta="urn:oasis:names:tc:opendocument:xmlns:meta:1.0" xmlns:dc="http://purl.org/dc/elements/1.1/" office:version="1.2">
  <office:meta>
    <dc:date>2026-05-04T23:55:55Z</dc:date>
    <meta:generator>defter</meta:generator>
  </office:meta>
</office:document-meta>
</file>